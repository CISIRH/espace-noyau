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Light" style:font-family-generic="modern" style:font-pitch="variable"/>
    <style:font-face style:name="Marianne Light1" svg:font-family="'Marianne Light'" style:font-adornments="Maigre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16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1" fo:font-size="10pt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51pt solid #000000" style:text-align-source="fix" style:repeat-content="false" fo:background-color="transparent" fo:wrap-option="wrap" fo:border-left="0.51pt solid #000000" fo:padding-bottom="0.15cm" fo:padding-left="0.101cm" fo:padding-right="0.101cm" fo:padding-top="0.15cm" fo:border-right="none" fo:border-top="0.51pt solid #000000" style:vertical-align="middle"/>
      <style:paragraph-properties fo:text-align="center"/>
      <style:text-properties fo:color="#000000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250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51pt solid #000000" style:text-align-source="fix" style:repeat-content="false" fo:background-color="transparent" fo:wrap-option="wrap" fo:border-left="0.51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250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dddddd" style:text-align-source="fix" style:repeat-content="false" fo:wrap-option="wrap" fo:padding-bottom="0.15cm" fo:padding-left="0.101cm" fo:padding-right="0.101cm" fo:padding-top="0.15cm" style:vertical-align="middle"/>
      <style:paragraph-properties fo:text-align="center" fo:margin-left="0cm"/>
      <style:text-properties style:font-name="Marianne Light1" fo:font-size="10pt" fo:font-weight="250"/>
    </style:style>
    <style:style style:name="ce21" style:family="table-cell" style:parent-style-name="Default" style:data-style-name="N100">
      <style:table-cell-properties fo:border-bottom="0.51pt solid #000000" fo:background-color="#ffff00" style:text-align-source="fix" style:repeat-content="false" fo:wrap-option="wrap" fo:border-left="0.51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250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fo:padding-bottom="0.15cm" fo:padding-left="0.101cm" fo:padding-right="0.101cm" fo:padding-top="0.15cm" style:vertical-align="middle"/>
      <style:paragraph-properties fo:text-align="center" fo:margin-left="0cm"/>
      <style:text-properties style:font-name="Marianne Light1" fo:font-size="10pt" fo:font-weight="250"/>
    </style:style>
    <style:style style:name="ce24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1" fo:font-size="10pt"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font-name="Marianne Light" fo:font-size="10pt" fo:font-weight="250" style:text-underline-mode="continuous" style:text-overline-mode="continuous" style:text-line-through-mode="continuous" style:font-size-asian="10pt" style:font-name-complex="Tahoma" style:font-size-complex="10pt" style:language-complex="none" style:country-complex="none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 fo:margin-left="0cm"/>
      <style:text-properties style:font-name="Marianne Light1" fo:font-size="10pt"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padding-bottom="0.15cm" fo:padding-left="0.101cm" fo:padding-right="0.101cm" fo:padding-top="0.15cm" style:vertical-align="middle"/>
      <style:paragraph-properties fo:text-align="start"/>
      <style:text-properties style:font-name="Marianne Light1" fo:font-size="10pt" fo:font-weight="250"/>
    </style:style>
    <style:style style:name="ce19" style:family="table-cell" style:parent-style-name="Default">
      <style:table-cell-properties fo:background-color="transparent" fo:wrap-option="wrap" fo:padding-bottom="0.15cm" fo:padding-left="0.101cm" fo:padding-right="0.101cm" fo:padding-top="0.15cm" style:vertical-align="middle"/>
      <style:text-properties style:font-name="Marianne Light1" fo:font-size="10pt" fo:font-weight="250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language="fr" fo:country="FR" style:language-asian="hi" style:country-asian="IN" style:font-name-asian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letter-kerning="true" fo:language="fr" fo:country="FR" style:language-asian="hi" style:country-asian="IN" style:font-name-asian="Arial" style:font-size-asian="12pt" style:font-weight-asian="normal" style:font-weight-complex="normal"/>
    </style:style>
    <style:style style:name="T3" style:family="text">
      <style:text-properties fo:font-weight="normal" style:letter-kerning="true" fo:language="fr" fo:country="FR" style:language-asian="hi" style:country-asian="IN" style:font-name-asian="Arial" style:font-size-asian="12pt" style:font-weight-asian="normal" style:font-weight-complex="normal" fo:color="#000000" style:text-underline-style="none" style:text-underline-color="font-color" style:text-line-through-type="none" fo:font-style="normal" style:text-outline="false" fo:text-shadow="none" style:font-size-complex="12pt" style:font-style-asian="normal" style:font-style-complex="normal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Feui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0"/>
        <table:table-column table:style-name="co2" table:default-cell-style-name="ce18"/>
        <table:table-column table:style-name="co3" table:number-columns-repeated="1020" table:default-cell-style-name="ce18"/>
        <table:table-column table:style-name="co3" table:number-columns-repeated="2" table:default-cell-style-name="ce19"/>
        <table:table-row table:style-name="ro1">
          <table:table-cell table:style-name="ce7" office:value-type="string" calcext:value-type="string">
            <text:p>CODE</text:p>
          </table:table-cell>
          <table:table-cell table:style-name="ce24" office:value-type="string" calcext:value-type="string">
            <text:p>SITUATION STATUTAIRE</text:p>
            <text:p>L’ensemble des codes doit figurer dans le paramètre BD82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2" office:value-type="string" calcext:value-type="string">
            <text:p>FONCTIONNAIRES DE L’ÉTAT ET MAGISTRATS DES ORDRES JUDICIAIRE, ADMINISTRATIF ET FINANCIE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01</text:p>
          </table:table-cell>
          <table:table-cell table:style-name="ce13" office:value-type="string" calcext:value-type="string">
            <text:p>TITULAIRE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02</text:p>
          </table:table-cell>
          <table:table-cell table:style-name="ce13" office:value-type="string" calcext:value-type="string">
            <text:p>TITULAIRES AVEC INDEMNITÉ COMPENSATRIC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03</text:p>
          </table:table-cell>
          <table:table-cell table:style-name="ce13" office:value-type="string" calcext:value-type="string">
            <text:p>TITULAIRES AVEC RETENUE PC SUR INDICE SPÉCIAL 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04</text:p>
          </table:table-cell>
          <table:table-cell table:style-name="ce13" office:value-type="string" calcext:value-type="string">
            <text:p>TITULAIRES SANS RETENUE PC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07</text:p>
          </table:table-cell>
          <table:table-cell table:style-name="ce13" office:value-type="string" calcext:value-type="string">
            <text:p>TITULAIRES DE LA POLICE NATIONALE AVEC TAUX PC MAJORÉ SUR ASSIETTE SPÉCI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8</text:p>
          </table:table-cell>
          <table:table-cell table:style-name="ce13" office:value-type="string" calcext:value-type="string">
            <text:p>TITULAIRES DE LA POLICE NATIONALE AVEC TAUX PC MAJORÉ SUR ASSIETTE SPÉCIALE (PERSONNEL DE DIRECTION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9</text:p>
          </table:table-cell>
          <table:table-cell table:style-name="ce13" office:value-type="string" calcext:value-type="string">
            <text:p>PERSONNELS DES ÉTABLISSEMENTS PÉNITENTIAIRES AVEC TAUX PC MAJORÉ SUR ASSIETTE SPÉCIALE</text:p>
          </table:table-cell>
          <table:table-cell table:number-columns-repeated="102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PERSONNELS DE LA BRANCHE SURVEILLANCE DE LA DGDDI AVEC TAUX PC MAJORÉ SUR ASSIETTE SPÉCIALE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2" office:value-type="string" calcext:value-type="string">
            <text:p>PERSONNELS A STATUT MILITAIRE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0</text:p>
          </table:table-cell>
          <table:table-cell table:style-name="ce13" office:value-type="string" calcext:value-type="string">
            <text:p>MILITAIRES AFFECTÉS SUR EMPLOI CIVIL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1</text:p>
          </table:table-cell>
          <table:table-cell table:style-name="ce13" office:value-type="string" calcext:value-type="string">
            <text:p>INGÉNIEURS DE L’ARMEMENT (IA)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2</text:p>
          </table:table-cell>
          <table:table-cell table:style-name="ce13" office:value-type="string" calcext:value-type="string">
            <text:p>INGÉNIEURS D’ÉTUDES DES TECHNIQUES D’ARMEMENT (IETA)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3</text:p>
          </table:table-cell>
          <table:table-cell table:style-name="ce13" office:value-type="string" calcext:value-type="string">
            <text:p>OFFICIERS DU CORPS TECHNIQUE ET ADMINISTRATIF DE L’ARMEMENT (OCTAA)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5</text:p>
          </table:table-cell>
          <table:table-cell table:style-name="ce13" office:value-type="string" calcext:value-type="string">
            <text:p>CORPS DU CONTRÔLE GÉNÉRAL DES ARMÉES (CGA)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6</text:p>
          </table:table-cell>
          <table:table-cell table:style-name="ce13" office:value-type="string" calcext:value-type="string">
            <text:p>RÉSERVISTES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2" office:value-type="string" calcext:value-type="string">
            <text:p>PERSONNELS A STATUT OUVRIER AFFILIES AU FSPOEIE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OUVRIERS DES PARCS ET ATELIERS</text:p>
          </table:table-cell>
          <table:table-cell table:number-columns-repeated="1022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OUVRIERS DE LA DÉFENSE STAGIAIRES DANS LES ÉCOLES OU CENTRES DE FORMATION</text:p>
          </table:table-cell>
          <table:table-cell table:number-columns-repeated="1022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OUVRIERS RÉGLEMENTÉS DU LIVRE</text:p>
          </table:table-cell>
          <table:table-cell table:number-columns-repeated="1022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OUVRIERS RÉGLEMENTÉS DU MÉTAL</text:p>
          </table:table-cell>
          <table:table-cell table:number-columns-repeated="1022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4" office:value-type="string" calcext:value-type="string">
            <text:p>TECHNICIENS À STATUT OUVRIER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 office:value-type="string" calcext:value-type="string">
            <text:p>PERSONNELS CONTRACTUELS RECRUTÉS A DURÉE DÉTERMINÉE PAR DÉROGATION A L’ARTICLE L.311-1 DU CODE GÉNÉRAL DE LA FONCTION PUBLIQUE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6" office:value-type="string" calcext:value-type="string">
            <text:p>ARTICLE L.326-10<text:span text:style-name="T1"> – PARCOURS D’ACCÈS AUX CARRIÈRES DE LA FONCTION PUBLIQUE</text:span>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3A</text:p>
          </table:table-cell>
          <table:table-cell table:style-name="ce17" office:value-type="string" calcext:value-type="string">
            <text:p>ARTICLE L.341-1 – EMPLOIS SUPÉRIEURS À LA DISCRÉTION DU GOUVERNEME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3B</text:p>
          </table:table-cell>
          <table:table-cell table:style-name="ce17" office:value-type="string" calcext:value-type="string">
            <text:p>ARTICLE L.332-1 1° - EMPLOIS DES ÉTABLISSEMENTS PUBLICS DE L’ÉTAT SOUS RÉSERVE DES DISPOSITIONS DU CODE DE LA RECHERCH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C</text:p>
          </table:table-cell>
          <table:table-cell table:style-name="ce13" office:value-type="string" calcext:value-type="string">
            <text:p>EN EXTINCTION LE 3° DE L’ARTICLE 3 DE LA LOI N° 84-16 DU 11 JANVIER 1984 ÉTANT ABROGÉ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D</text:p>
          </table:table-cell>
          <table:table-cell table:style-name="ce13" office:value-type="string" calcext:value-type="string">
            <text:p>ARTICLE L.332-1 2° - EMPLOIS DES CENTRES HOSPITALIERS ET UNIVERSITAIRES OCCUPÉS PAR DES MEMBRES DU PERSONNEL ENSEIGNANT ET HOSPITALI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E</text:p>
          </table:table-cell>
          <table:table-cell table:style-name="ce13" office:value-type="string" calcext:value-type="string">
            <text:p>EN EXTINCTION EN L’ABSENCE D’ÉQUIVALENT DU 5° DE L’ARTICLE 3 DE LA LOI N° 84-16 DU 11 JANVIER 1984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3F</text:p>
          </table:table-cell>
          <table:table-cell table:style-name="ce13" office:value-type="string" calcext:value-type="string">
            <text:p>ARTICLE L.332-1 3° - MAÎTRES D’INTERNAT – SURVEILLANTS D’EXTERN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G</text:p>
          </table:table-cell>
          <table:table-cell table:style-name="ce13" office:value-type="string" calcext:value-type="string">
            <text:p>ARTICLE L.332-2 1° - ABSENCE DE CORPS DE FONCTIONNAIRES SUSCEPTIBLES D’ASSURER LES FONCTIONS CORRESPONDANTE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3H</text:p>
          </table:table-cell>
          <table:table-cell table:style-name="ce13" office:value-type="string" calcext:value-type="string">
            <text:p>ARTICLE L.332-2 2° - NATURE DES FONCTIONS, BESOINS DES SERVICES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3K</text:p>
          </table:table-cell>
          <table:table-cell table:style-name="ce13" office:value-type="string" calcext:value-type="string">
            <text:p>ARTICLE L.332-3 - FONCTIONS CORRESPONDANT À UN BESOIN PERMANENT ET IMPLIQUANT UN SERVICE À TEMPS INCOMPLET D’UNE DURÉE N’EXCÉDANT PAS 70% D’UN SERVICE À TEMPS COMPLET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3L</text:p>
          </table:table-cell>
          <table:table-cell table:style-name="ce13" office:value-type="string" calcext:value-type="string">
            <text:p>ARTICLE L.332-6 – REMPLACEMENT MOMENTANÉ DE FONCTIONNAIRES OU D’AGENTS CONTRACTUELS AUTORISÉS À EXERCER LEURS FONCTIONS À TEMPS PARTIEL OU INDISPONIBL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M</text:p>
          </table:table-cell>
          <table:table-cell table:style-name="ce13" office:value-type="string" calcext:value-type="string">
            <text:p>ARTICLE L.332-7 - VACANCE TEMPORAIRE D’EMPLOI DANS L’ATTENTE DU RECRUTEMENT D’UN FONCTIONNAI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N</text:p>
          </table:table-cell>
          <table:table-cell table:style-name="ce13" office:value-type="string" calcext:value-type="string">
            <text:p>ARTICLE L.332-22 - ACCROISSEMENT TEMPORAIRE OU SAISONNIER D’ACTIVITÉ LORSQUE CETTE CHARGE NE PEUT ÊTRE ASSURÉE PAR DES FONCTIONNAIR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Z</text:p>
          </table:table-cell>
          <table:table-cell table:style-name="ce13" office:value-type="string" calcext:value-type="string">
            <text:p>ARTICLE L. 352-4 - BÉNÉFICIAIRES DE L’OBLIGATION D’EMPLOI DES TRAVAILLEURS HANDICAPÉ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4G</text:p>
          </table:table-cell>
          <table:table-cell table:style-name="ce13" office:value-type="string" calcext:value-type="string">
            <text:p>ARTICLE L.342-1 – EMPLOI DE DIRECTION DE L’ÉTAT 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4H</text:p>
          </table:table-cell>
          <table:table-cell table:style-name="ce13" office:value-type="string" calcext:value-type="string">
            <text:p>ARTICLE L.332-24 – CONTRAT DE PROJE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J</text:p>
          </table:table-cell>
          <table:table-cell table:style-name="ce13" office:value-type="string" calcext:value-type="string">
            <text:p>ARTICLE L.332-2 3° - EMPLOI NE NÉCESSITANT PAS UNE FORMATION STATUTAIRE DONNANT LIEU À TITULARISATION DANS UN CORPS DE FONCTIONNAIRE 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1" office:value-type="string" calcext:value-type="string">
            <text:p>PERSONNELS CONTRACTUELS RECRUTÉS A DURÉE INDÉTERMINÉE <text:s/>PAR DÉROGATION A L’ARTICLE L.311-1 ET EN APPLICATION DES DISPOSITIONS COMBINÉES DE L’ARTICLE L.332-4 DU CODE GÉNÉRAL DE LA FONCTION PUBLIQUE ET DES ARTICLES PRÉCISANT LES MOTIFS DE RECRUTEMENT EN CDD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3P</text:p>
          </table:table-cell>
          <table:table-cell table:style-name="ce13" office:value-type="string" calcext:value-type="string">
            <text:p>ARTICLE L.341-1 – EMPLOIS SUPÉRIEURS À LA DISCRÉTION DU GOUVERN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Q</text:p>
          </table:table-cell>
          <table:table-cell table:style-name="ce13" office:value-type="string" calcext:value-type="string">
            <text:p>ARTICLE L.332-1 1° - EMPLOIS DES ÉTABLISSEMENTS PUBLICS DE L’ÉTAT SOUS RÉSERVE DES DISPOSITIONS DU CODE DE LA RECHERCH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R</text:p>
          </table:table-cell>
          <table:table-cell table:style-name="ce13" office:value-type="string" calcext:value-type="string">
            <text:p>EN EXTINCTION, LE 3° DE L’ARTICLE 3 DE LA LOI N° 84-16 DU 11 JANVIER 1984 ÉTANT ABROGÉ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T</text:p>
          </table:table-cell>
          <table:table-cell table:style-name="ce14" office:value-type="string" calcext:value-type="string">
            <text:p>EN EXTINCTION EN L’ABSENCE D’ÉQUIVALENT DU 5° DE L’ARTICLE 3 DE LA LOI N° 84-16 DU 11 JANVIER 1984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3U</text:p>
          </table:table-cell>
          <table:table-cell table:style-name="ce14" office:value-type="string" calcext:value-type="string">
            <text:p>ARTICLE L.332-1 3° - MAÎTRES D’INTERNAT – SURVEILLANTS D’EXTERNA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3V</text:p>
          </table:table-cell>
          <table:table-cell table:style-name="ce13" office:value-type="string" calcext:value-type="string">
            <text:p>ARTICLE L.332-2 1° - ABSENCE DE CORPS DE FONCTIONNAIRES SUSCEPTIBLES D’ASSURER LES FONCTIONS CORRESPONDANTE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3W</text:p>
          </table:table-cell>
          <table:table-cell table:style-name="ce13" office:value-type="string" calcext:value-type="string">
            <text:p>ARTICLE L.332-2 2° - <text:s/>NATURE DES FONCTIONS, BESOINS DES SERVICES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3Y</text:p>
          </table:table-cell>
          <table:table-cell table:style-name="ce13" office:value-type="string" calcext:value-type="string">
            <text:p>ARTICLE L.332-3 - FONCTIONS CORRESPONDANT À UN BESOIN PERMANENT ET IMPLIQUANT UN SERVICE À TEMPS INCOMPLET N’EXCÉDANT PAS 70 % D’UN SERVICE À TEMPS COMPLE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4K</text:p>
          </table:table-cell>
          <table:table-cell table:style-name="ce13" office:value-type="string" calcext:value-type="string">
            <text:p>ARTICLE L.332-2 3° - <text:s/>EMPLOI NE NÉCESSITANT PAS UNE FORMATION STATUTAIRE DONNANT LIEU À TITULARISATION DANS UN CORPS DE FONCTIONNAIRE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" office:value-type="string" calcext:value-type="string">
            <text:p>PERSONNELS CONTRACTUELS RECRUTÉS SUR D’AUTRES FONDEMENTS QUE LE CODE GÉNÉRAL DE LA FONCTION PUBLIQUE</text:p>
          </table:table-cell>
          <table:table-cell table:number-columns-repeated="1022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16" office:value-type="string" calcext:value-type="string">
            <text:p>JURISPRUDENCE BERKANI, RÈGLEMENT INTÉRIEUR NATIONAL, INTERVENANTS EXTÉRIEURS NON FONCTIONNAIRES À TITRE PRINCIPAL, ALLOCATAIRES DE <text:span text:style-name="T2">L’</text:span><text:span text:style-name="T3">INDEMNISATION DU CHÔMAGE, AUTRES</text:span></text:p>
          </table:table-cell>
          <table:table-cell table:number-columns-repeated="102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PERSONNES RÉMUNÉRÉES À L'HEURE, À LA JOURNÉE OU À LA VACATION PAR MOUVEMENT DE TYPE 07</text:p>
          </table:table-cell>
          <table:table-cell table:number-columns-repeated="1022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3" office:value-type="string" calcext:value-type="string">
            <text:p>VOLONTAIRES DU SERVICE CIVIQUE</text:p>
          </table:table-cell>
          <table:table-cell table:number-columns-repeated="1022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3" office:value-type="string" calcext:value-type="string">
            <text:p>CONTRAT UNIQUE D’INSERTION (CUI-CAE)</text:p>
          </table:table-cell>
          <table:table-cell table:number-columns-repeated="1022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MARINS DE COMMERCE EMPLOYÉS PAR LE SCN « ARMEMENT DES PHARES ET BALISES »</text:p>
          </table:table-cell>
          <table:table-cell table:number-columns-repeated="1022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13" office:value-type="string" calcext:value-type="string">
            <text:p>RÉSERVIST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J</text:p>
          </table:table-cell>
          <table:table-cell table:style-name="ce13" office:value-type="string" calcext:value-type="string">
            <text:p>ENSEIGNANTS CHERCHEURS MENTIONNÉS À L’ARTICLE L.952-1 DU CODE DE L’ÉDUCATION RECRUTÉS À DURÉE DÉTERMINÉ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X</text:p>
          </table:table-cell>
          <table:table-cell table:style-name="ce13" office:value-type="string" calcext:value-type="string">
            <text:p>ENSEIGNANTS CHERCHEURS MENTIONNÉS À L’ARTICLE L.952-1 DU CODE DE L’ÉDUCATION ET <text:s/>RECRUTÉS À DURÉE INDÉTERMINÉE</text:p>
          </table:table-cell>
          <table:table-cell table:number-columns-repeated="1022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13" office:value-type="string" calcext:value-type="string">
            <text:p>PILOTES ET PARACHUTISTES</text:p>
          </table:table-cell>
          <table:table-cell table:number-columns-repeated="1022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13" office:value-type="string" calcext:value-type="string">
            <text:p>MÉCANICIENS NAVIGANTS</text:p>
          </table:table-cell>
          <table:table-cell table:number-columns-repeated="1022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3" office:value-type="string" calcext:value-type="string">
            <text:p>COLLABORATEURS OCCASIONNELS DU SERVICE PUBLIC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4D</text:p>
          </table:table-cell>
          <table:table-cell table:style-name="ce13" office:value-type="string" calcext:value-type="string">
            <text:p>MAGISTRATS HONORAIRES EXERÇANT DES FONCTIONS JURIDICTIONNELLES - <text:s/>AVOCATS HONORAIRES EXERÇANT LES FONCTIONS D’ASSESSEUR DES COURS CRIMINELLES DÉPARTEMENTALE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4E</text:p>
          </table:table-cell>
          <table:table-cell table:style-name="ce13" office:value-type="string" calcext:value-type="string">
            <text:p>MAGISTRATS HONORAIRES EXERÇANT DES FONCTIONS NON JURIDICTIONNELLES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4F</text:p>
          </table:table-cell>
          <table:table-cell table:style-name="ce13" office:value-type="string" calcext:value-type="string">
            <text:p>CONTRACTUELS RECRUTÉS SUR LE FONDEMENT DE L’ARTICLE 167 DE LA LOI N°2017-86 DU 27 JANVIER 2017 RELATIVE À L'ÉGALITÉ ET À LA CITOYENNETÉ EN VUE DE PRÉPARER DES CONCOURS DE CATÉGORIE A OU B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J</text:p>
          </table:table-cell>
          <table:table-cell table:style-name="ce13" office:value-type="string" calcext:value-type="string">
            <text:p>ACCOMPAGNANTS DES ÉLÈVES EN SITUATION DE HANDICAP MENTIONNÉS À ARTICLE L.917-1 DU CODE DE L'ÉDUCATION ET RECRUTÉS À DURÉE DÉTERMINÉ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K</text:p>
          </table:table-cell>
          <table:table-cell table:style-name="ce13" office:value-type="string" calcext:value-type="string">
            <text:p>ACCOMPAGNANTS DES ÉLÈVES EN SITUATION DE HANDICAP MENTIONNÉS À ARTICLE L.917-1 DU CODE DE L'ÉDUCATION ET RECRUTÉS À DURÉE INDÉTERMINÉE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4L</text:p>
          </table:table-cell>
          <table:table-cell table:style-name="ce13" office:value-type="string" calcext:value-type="string">
            <text:p>CONTRACTUELS RECRUTÉS À DURÉE DÉTERMINÉE POUR OCCUPER EN EMPLOI DONNANT LIEU À TITULARISATION DANS UN CORPS DE PROFESSEUR AU TITRE DE L'ARTICLE L.952-6-2 DU CODE DE L'ÉDUCATI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4M</text:p>
          </table:table-cell>
          <table:table-cell table:style-name="ce13" office:value-type="string" calcext:value-type="string">
            <text:p>CONTRACTUELS RECRUTÉS À DURÉE DÉTERMINÉE DANS LE CADRE DU CONTRAT POST-DOCTORAL PRÉVU À L'ARTICLE L.412-4 DU CODE DE LA RECHERCHE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4N</text:p>
          </table:table-cell>
          <table:table-cell table:style-name="ce13" office:value-type="string" calcext:value-type="string">
            <text:p>CONTRACTUELS RECRUTÉS À DURÉE DÉTERMINÉE POUR OCCUPER EN EMPLOI DONNANT LIEU À TITULARISATION DANS LE CORPS DE DIRECTEUR DE RECHERCHE AU TITRE DE L'ARTICLE L.422-3 DU CODE DE LA RECHERCH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P</text:p>
          </table:table-cell>
          <table:table-cell table:style-name="ce13" office:value-type="string" calcext:value-type="string">
            <text:p>CONTRACTUELS RECRUTÉS À DURÉE INDÉTERMINÉE DANS LE CADRE DU CONTRAT DE MISSION DE RECHERCHE PRÉVU À L'ARTICLE L.431-6 DU CODE DE LA RECHERCH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4Q</text:p>
          </table:table-cell>
          <table:table-cell table:style-name="ce13" office:value-type="string" calcext:value-type="string">
            <text:p>CONTRACTUELS EN POSTE À L’ÉTRANGER RÉGIS PAR LE DÉCRET <text:s/>N°69-697 DU 18 JUIN 1969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4R</text:p>
          </table:table-cell>
          <table:table-cell table:style-name="ce31" office:value-type="string" calcext:value-type="string">
            <text:p>APPRENTI – CONTRAT POSTERIEUR AU 1ER MARS 2025 – maintenance PAYSAGE nécessaire</text:p>
          </table:table-cell>
          <table:table-cell table:number-columns-repeated="1022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3" office:value-type="string" calcext:value-type="string">
            <text:p>ASSISTANT D’ÉDUCATION OU ACCOMPAGNANT DES ÉLÈVES EN SITUATION DE HANDICAP DANS UN EPLE EN AUTO-ASSURANCE EN MATIÈRE D’ASSURANCE CHÔMAGE</text:p>
          </table:table-cell>
          <table:table-cell table:number-columns-repeated="1022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3" office:value-type="string" calcext:value-type="string">
            <text:p>ASSISTANT D’ÉDUCATION OU ACCOMPAGNANT DES ÉLÈVES EN SITUATION DE HANDICAP DANS UN EPLE ADHÉRENT AU RÉGIME D’ASSURANCE CHÔMAGE</text:p>
          </table:table-cell>
          <table:table-cell table:number-columns-repeated="1022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13" office:value-type="string" calcext:value-type="string">
            <text:p>APPRENTI</text:p>
          </table:table-cell>
          <table:table-cell table:number-columns-repeated="1022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13" office:value-type="string" calcext:value-type="string">
            <text:p>POLICIER ADJOINT</text:p>
          </table:table-cell>
          <table:table-cell table:number-columns-repeated="1022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13" office:value-type="string" calcext:value-type="string">
            <text:p>OUVRIERS DES PARCS ET ATELIERS NON TITULAIRES</text:p>
          </table:table-cell>
          <table:table-cell table:number-columns-repeated="1022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13" office:value-type="string" calcext:value-type="string">
            <text:p>OUVRIERS NON RÉGLEMENTÉS DU LIVRE</text:p>
          </table:table-cell>
          <table:table-cell table:number-columns-repeated="1022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13" office:value-type="string" calcext:value-type="string">
            <text:p>OUVRIERS NON RÉGLEMENTÉS DU MÉTAL</text:p>
          </table:table-cell>
          <table:table-cell table:number-columns-repeated="1022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13" office:value-type="string" calcext:value-type="string">
            <text:p>TECHNICIENS À STATUT OUVRIER NON RÉGLEMENTÉS</text:p>
          </table:table-cell>
          <table:table-cell table:number-columns-repeated="1022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3" office:value-type="string" calcext:value-type="string">
            <text:p>MAÎTRES ET DOCUMENTALISTES DE L’ENSEIGNEMENT PRIVÉ AGRICOLE SOUS CONTRAT D’ASSOCIATION AVEC L’ÉTAT</text:p>
          </table:table-cell>
          <table:table-cell table:number-columns-repeated="1022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3" office:value-type="string" calcext:value-type="string">
            <text:p>MAÎTRES ET DOCUMENTALISTES DE L’ENSEIGNEMENT PRIVÉ GÉNÉRAL SOUS CONTRAT D’ASSOCIATION AVEC L’ÉTAT</text:p>
          </table:table-cell>
          <table:table-cell table:number-columns-repeated="1022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3" office:value-type="string" calcext:value-type="string">
            <text:p>MAÎTRES ET DOCUMENTALISTES DE L’ENSEIGNEMENT PRIVÉ GÉNÉRAL SOUS CONTRAT SIMPLE – PERSONNELS AFFILIÉS AU RÉGIME D’ASSURANCE CHÔMAG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DÉTACHEMENT DES FONCTIONNAIRES DE L’ÉTAT EN APPLICATION DES ARTICLES L.513-1 A L.513-13 DU CODE GÉNÉRAL DE LA FONCTION PUBLIQUE SUR EMPLOI CONDUISANT A PENSION 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13" office:value-type="string" calcext:value-type="string">
            <text:p>AU SEIN DE L’ÉTAT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5</text:p>
          </table:table-cell>
          <table:table-cell table:style-name="ce13" office:value-type="string" calcext:value-type="string">
            <text:p>DANS UN ÉTABLISSEMENT PUBLIC ADMINISTRATIF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9</text:p>
          </table:table-cell>
          <table:table-cell table:style-name="ce13" office:value-type="string" calcext:value-type="string">
            <text:p>AU SEIN DE LA GENDARMERI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1</text:p>
          </table:table-cell>
          <table:table-cell table:style-name="ce13" office:value-type="string" calcext:value-type="string">
            <text:p>AUPRÈS DE LA POLICE NATIONALE COMME ÉLÈVE OU STAGIAIRE BÉNÉFICIAIRE DE L’ISSP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4</text:p>
          </table:table-cell>
          <table:table-cell table:style-name="ce13" office:value-type="string" calcext:value-type="string">
            <text:p>COMME ÉLÈVE BÉNÉFICIAIRE DE L’ISS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6</text:p>
          </table:table-cell>
          <table:table-cell table:style-name="ce13" office:value-type="string" calcext:value-type="string">
            <text:p>AUPRÈS DE L’ADMINISTRATION PÉNITENTIAIRE COMME ÉLÈVE OU STAGIAIRE BÉNÉFICIAIRE DE LA PS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8</text:p>
          </table:table-cell>
          <table:table-cell table:style-name="ce13" office:value-type="string" calcext:value-type="string">
            <text:p>AUPRÈS DE LA DGDDI (BRANCHE SURVEILLANCE) COMME ÉLÈVE OU STAGIAIRE BÉNÉFICIAIRE DE L’IRTI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DÉTACHEMENT DES FONCTIONNAIRES DE L’ÉTAT EN APPLICATION DES ARTICLES L.513-1 A L.513-13 DU CODE GÉNÉRAL DE LA FONCTION PUBLIQUE SUR EMPLOI NE CONDUISANT PAS A PENS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A2</text:p>
          </table:table-cell>
          <table:table-cell table:style-name="ce13" office:value-type="string" calcext:value-type="string">
            <text:p>AU SEIN DE L’ÉTAT SUR UNE FONCTION AUTRE QU’ÉLECTIVE OU SYNDICAL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3</text:p>
          </table:table-cell>
          <table:table-cell table:style-name="ce13" office:value-type="string" calcext:value-type="string">
            <text:p>AU SEIN DE L’ÉTAT SUR UNE FONCTION 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6</text:p>
          </table:table-cell>
          <table:table-cell table:style-name="ce13" office:value-type="string" calcext:value-type="string">
            <text:p>DANS UN ÉTABLISSEMENT PUBLIC ADMINISTRATIF SUR UNE FONCTION AUTRE QU’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7</text:p>
          </table:table-cell>
          <table:table-cell table:style-name="ce13" office:value-type="string" calcext:value-type="string">
            <text:p>DANS UN ÉTABLISSEMENT PUBLIC ADMINISTRATIF SUR UNE FONCTION ÉLECTIVE OU SYNDICAL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8</text:p>
          </table:table-cell>
          <table:table-cell table:style-name="ce13" office:value-type="string" calcext:value-type="string">
            <text:p>DANS UN GROUPEMENT D’INTÉRÊT PUBLIC OU À L’OFFICE NATIONAL DES FORÊT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A</text:p>
          </table:table-cell>
          <table:table-cell table:style-name="ce13" office:value-type="string" calcext:value-type="string">
            <text:p>FONCTIONNAIRE ACTIF DE LA POLICE NATIONALE (HORS PERSONNEL DE DIRECTION) AU SEIN DE L’ÉTAT SUR UNE FONCTION 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</text:p>
          </table:table-cell>
          <table:table-cell table:style-name="ce13" office:value-type="string" calcext:value-type="string">
            <text:p>FONCTIONNAIRE ACTIF DE LA POLICE NATIONALE (PERSONNEL DE DIRECTION) AU SEIN DE L’ÉTAT SUR UNE FONCTION 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C</text:p>
          </table:table-cell>
          <table:table-cell table:style-name="ce13" office:value-type="string" calcext:value-type="string">
            <text:p>FONCTIONNAIRE ACTIF DE L’ADMINISTRATION PÉNITENTIAIRE AU SEIN DE L’ÉTAT SUR FONCTION ÉLECTIVE OU SYNDICAL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B</text:p>
          </table:table-cell>
          <table:table-cell table:style-name="ce13" office:value-type="string" calcext:value-type="string">
            <text:p>BÉNÉFICIAIRE DE L’ISSP – PERSONNEL DE DIRECTION DE LA POLICE NATION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C</text:p>
          </table:table-cell>
          <table:table-cell table:style-name="ce13" office:value-type="string" calcext:value-type="string">
            <text:p>BÉNÉFICIAIRES DE LA PSS PÉNITENTIAIRE HORS PERSONNELS SOCIAUX ÉDUCATIFS (POSTE ÉTAT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A</text:p>
          </table:table-cell>
          <table:table-cell table:style-name="ce13" office:value-type="string" calcext:value-type="string">
            <text:p>FONCTIONNAIRE ACTIF DE LA POLICE NATIONALE (HORS PERSONNEL DE DIRECTION) DANS UN ÉTABLISSEMENT PUBLIC ADMINISTRATIF SUR UNE FONCTION 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B</text:p>
          </table:table-cell>
          <table:table-cell table:style-name="ce13" office:value-type="string" calcext:value-type="string">
            <text:p>FONCTIONNAIRE ACTIF DE LA POLICE NATIONALE (PERSONNEL DE DIRECTION) DANS UN ÉTABLISSEMENT PUBLIC ADMINISTRATIF SUR UNE FONCTION 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C</text:p>
          </table:table-cell>
          <table:table-cell table:style-name="ce13" office:value-type="string" calcext:value-type="string">
            <text:p>FONCTIONNAIRE ACTIF DE L’ADMINISTRATION PÉNITENTIAIRE DANS UN ÉTABLISSEMENT PUBLIC ADMINISTRATIF SUR UNE FONCTION 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A</text:p>
          </table:table-cell>
          <table:table-cell table:style-name="ce13" office:value-type="string" calcext:value-type="string">
            <text:p>BÉNÉFICIAIRE DE L’ISSP DÉTACHÉ À L’ÉCOLE NATIONALE SUPÉRIEURE DE POLICE (MIN 826) SUR UN EMPLOI AUTRE DE DIREC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B</text:p>
          </table:table-cell>
          <table:table-cell table:style-name="ce13" office:value-type="string" calcext:value-type="string">
            <text:p>BÉNÉFICIAIRE DE L’ISSP DÉTACHÉ À L’ÉCOLE NATIONALE SUPÉRIEURE DE POLICE (MIN 826) SUR UN EMPLOI DE DIREC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C</text:p>
          </table:table-cell>
          <table:table-cell table:style-name="ce13" office:value-type="string" calcext:value-type="string">
            <text:p>BÉNÉFICIAIRES DE LA PSS PÉNITENTIAIRE HORS PERSONNELS SOCIAUX ÉDUCATIFS (POSTE ÉTABLISSEMENT PUBLIC)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GR</text:p>
          </table:table-cell>
          <table:table-cell table:style-name="ce13" office:value-type="string" calcext:value-type="string">
            <text:p>DANS L’ENSEIGNEMENT AGRICOLE PRIVÉ SOUS CONTRAT D’ASSOCIATION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DÉTACHEMENT DES MILITAIRES DANS DES CORPS DE FONCTIONNAIRES EN APPLICATION DE L’ARTICLE L.513-14 DU CODE GÉNÉRAL DE LA FONCTION PUBLIQUE SUR EMPLOI CONDUISANT A PENS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1</text:p>
          </table:table-cell>
          <table:table-cell table:style-name="ce13" office:value-type="string" calcext:value-type="string">
            <text:p>AU SEIN DE L’ÉTAT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4</text:p>
          </table:table-cell>
          <table:table-cell table:style-name="ce13" office:value-type="string" calcext:value-type="string">
            <text:p>AUPRÈS DE LA DIRECTION GÉNÉRALE DES DOUANES ET DROITS INDIRECT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5</text:p>
          </table:table-cell>
          <table:table-cell table:style-name="ce13" office:value-type="string" calcext:value-type="string">
            <text:p>DANS UN ÉTABLISSEMENT PUBLIC ADMINISTRATIF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9</text:p>
          </table:table-cell>
          <table:table-cell table:style-name="ce13" office:value-type="string" calcext:value-type="string">
            <text:p>AU SEIN DE LA GENDARMERI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1</text:p>
          </table:table-cell>
          <table:table-cell table:style-name="ce13" office:value-type="string" calcext:value-type="string">
            <text:p>BÉNÉFICIAIRE DE L’ISSP EN TANT QU’ÉLÈVE OU STAGIAIRE DE LA POLICE NATIONALE (POSTE ÉTAT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2</text:p>
          </table:table-cell>
          <table:table-cell table:style-name="ce13" office:value-type="string" calcext:value-type="string">
            <text:p>BÉNÉFICIAIRE DE L’ISSP EN TANT QU’ÉLÈVE OU STAGIAIRE DE LA POLICE NATIONALE À L’ÉCOLE NATIONALE SUPÉRIEURE DE POLIC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4</text:p>
          </table:table-cell>
          <table:table-cell table:style-name="ce13" office:value-type="string" calcext:value-type="string">
            <text:p>BÉNÉFICIAIRE DE L’ISSG DÉTACHÉ EN GENDARMERIE EN TANT QU’ÉLÈV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6</text:p>
          </table:table-cell>
          <table:table-cell table:style-name="ce13" office:value-type="string" calcext:value-type="string">
            <text:p>BÉNÉFICIAIRE DE LA PSS PÉNITENTIAIRE EN TANT QU’ÉLÈVE OU STAGIAI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8</text:p>
          </table:table-cell>
          <table:table-cell table:style-name="ce13" office:value-type="string" calcext:value-type="string">
            <text:p>BÉNÉFICIAIRE DE L’IRTI EN TANT QU’ÉLÈVE OU STAGIAIRE DE LA BRANCHE DE SURVEILLANCE DES DOUANE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9</text:p>
          </table:table-cell>
          <table:table-cell table:style-name="ce13" office:value-type="string" calcext:value-type="string">
            <text:p>BÉNÉFICIAIRE DE L’IRTI EN TANT QU’ÉLÈVE OU STAGIAIRE À L’ÉCOLE DES DOUANE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J</text:p>
          </table:table-cell>
          <table:table-cell table:style-name="ce13" office:value-type="string" calcext:value-type="string">
            <text:p>MILITAIRE DÉTACHÉ EN GENDARMERIE AVEC ISSG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NL</text:p>
          </table:table-cell>
          <table:table-cell table:style-name="ce13" office:value-type="string" calcext:value-type="string">
            <text:p>BÉNÉFICIAIRE DE L’ISSG HORS GENDARMERIE DANS UN CORPS PLACÉ HORS STATUT SPÉCIFIQUE OU N’EXERÇANT PAS DES FONCTIONS ANALOGUES À CELLES DE GENDARME OU DÉTACHEMENT SUR EMPLOI CONDUISANT À PENSION DANS UN CORPS SOUS STATUT SPÉCIFIQUE SUR POST ETA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NN</text:p>
          </table:table-cell>
          <table:table-cell table:style-name="ce13" office:value-type="string" calcext:value-type="string">
            <text:p>BÉNÉFICIAIRE DE L’ISSG HORS GENDARMERIE DANS UN CORPS PLACÉ HORS STATUT SPÉCIFIQUE OU N’EXERÇANT PAS DES FONCTIONS ANALOGUES À CELLES DE GENDARME OU DÉTACHEMENT SUR EMPLOI CONDUISANT À PENSION DANS UN CORPS D’ÉTABLISSEMENT PUBLIC NON MILITAIR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DÉTACHEMENT DES MILITAIRES DANS DES CORPS DE FONCTIONNAIRES EN APPLICATION DE L’ARTICLE L.513-14 DU CODE GÉNÉRAL DE LA FONCTION PUBLIQUE SUR EMPLOI NE CONDUISANT PAS A PENS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2</text:p>
          </table:table-cell>
          <table:table-cell table:style-name="ce13" office:value-type="string" calcext:value-type="string">
            <text:p>AU SEIN DE L’ÉTAT SUR UNE FONCTION AUTRE QU’ÉLECTIV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3</text:p>
          </table:table-cell>
          <table:table-cell table:style-name="ce13" office:value-type="string" calcext:value-type="string">
            <text:p>AU SEIN DE L’ÉTAT SUR UNE FONCTION ÉLECTIV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6</text:p>
          </table:table-cell>
          <table:table-cell table:style-name="ce13" office:value-type="string" calcext:value-type="string">
            <text:p>DANS UN ÉTABLISSEMENT PUBLIC ADMINISTRATIF SUR UNE FONCTION AUTRE QU’ÉLECTIV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7</text:p>
          </table:table-cell>
          <table:table-cell table:style-name="ce13" office:value-type="string" calcext:value-type="string">
            <text:p>DANS UN ÉTABLISSEMENT PUBLIC ADMINISTRATIF SUR UNE FONCTION ÉLECTIV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8</text:p>
          </table:table-cell>
          <table:table-cell table:style-name="ce13" office:value-type="string" calcext:value-type="string">
            <text:p>DANS UN GROUPEMENT D’INTÉRÊT PUBLIC OU À L’OFFICE NATIONAL DES FORÊT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A</text:p>
          </table:table-cell>
          <table:table-cell table:style-name="ce13" office:value-type="string" calcext:value-type="string">
            <text:p>GENDARME AU SEIN DE L’ÉTAT SUR UNE FONCTION ÉLECTIV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B</text:p>
          </table:table-cell>
          <table:table-cell table:style-name="ce13" office:value-type="string" calcext:value-type="string">
            <text:p>GENDARME DANS UN ÉTABLISSEMENT PUBLIC ADMINISTRATIF SUR UNE FONCTION ÉLECTIV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A</text:p>
          </table:table-cell>
          <table:table-cell table:style-name="ce13" office:value-type="string" calcext:value-type="string">
            <text:p>GENDARME DÉTACHÉ SUR UN AUTRE CORPS EN GENDARMERI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B</text:p>
          </table:table-cell>
          <table:table-cell table:style-name="ce13" office:value-type="string" calcext:value-type="string">
            <text:p>GENDARME DÉTACHÉ SUR UN AUTRE CORPS DE GENDARMERIE EN ÉTABLISSEMENT PUBLIC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DÉTACHEMENT DES FONCTIONNAIRES D’ÉTABLISSEMENTS PUBLICS DE L’ÉTAT EN APPLICATION DES ARTICLES L.513-1 A L.513-13 DU CODE GÉNÉRAL DE LA FONCTION PUBLIQUE SUR EMPLOI CONDUISANT A PENS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1</text:p>
          </table:table-cell>
          <table:table-cell table:style-name="ce13" office:value-type="string" calcext:value-type="string">
            <text:p>AU SEIN DE L’ÉTAT 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5</text:p>
          </table:table-cell>
          <table:table-cell table:style-name="ce13" office:value-type="string" calcext:value-type="string">
            <text:p>DANS UN AUTRE ÉTABLISSEMENT PUBLIC ADMINISTRATIF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9</text:p>
          </table:table-cell>
          <table:table-cell table:style-name="ce13" office:value-type="string" calcext:value-type="string">
            <text:p>AU SEIN DE LA GENDARMERI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DÉTACHEMENT DES FONCTIONNAIRES D’ÉTABLISSEMENTS PUBLICS DE L’ÉTAT EN APPLICATION DES ARTICLES L.513-1 A L.513-13 DU CODE GÉNÉRAL DE LA FONCTION PUBLIQUE SUR EMPLOI NE CONDUISANT PAS A PENS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2</text:p>
          </table:table-cell>
          <table:table-cell table:style-name="ce13" office:value-type="string" calcext:value-type="string">
            <text:p>AU SEIN DE L’ÉTAT SUR UNE FONCTION AUTRE QU’ÉLECTIVE OU SYNDICAL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3</text:p>
          </table:table-cell>
          <table:table-cell table:style-name="ce13" office:value-type="string" calcext:value-type="string">
            <text:p>AU SEIN DE L’ÉTAT SUR UNE FONCTION 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6</text:p>
          </table:table-cell>
          <table:table-cell table:style-name="ce13" office:value-type="string" calcext:value-type="string">
            <text:p>DANS UN AUTRE ÉTABLISSEMENT PUBLIC ADMINISTRATIF SUR UNE FONCTION AUTRE QU’ÉLECTIVE OU SYNDIC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7</text:p>
          </table:table-cell>
          <table:table-cell table:style-name="ce13" office:value-type="string" calcext:value-type="string">
            <text:p>DANS UN AUTRE ÉTABLISSEMENT PUBLIC ADMINISTRATIF SUR UNE FONCTION ÉLECTIVE OU SYNDICAL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DÉTACHEMENT DES FONCTIONNAIRES TERRITORIAUX OU HOSPITALIERS <text:s/>EN APPLICATION DES ARTICLES L.513-1 A L.513-13 DU CODE GÉNÉRAL DE LA FONCTION PUBLIQUE SUR EMPLOI CONDUISANT A PENS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L</text:p>
          </table:table-cell>
          <table:table-cell table:style-name="ce13" office:value-type="string" calcext:value-type="string">
            <text:p>AU SEIN DE L’ÉTAT OU D’UN ÉTABLISSEMENT PUBLIC DE L’ÉTAT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2</text:p>
          </table:table-cell>
          <table:table-cell table:style-name="ce13" office:value-type="string" calcext:value-type="string">
            <text:p>CLASSÉ EN CATÉGORIE ACTIVE DE LA POLICE NATIONALE AVEC PERCEPTION DE L’ISS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13" office:value-type="string" calcext:value-type="string">
            <text:p>CLASSÉ EN CATÉGORIE ACTIVE DE L’ADMINISTRATION PÉNITENTIAIRE AVEC PERCEPTION DE LA PS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5</text:p>
          </table:table-cell>
          <table:table-cell table:style-name="ce13" office:value-type="string" calcext:value-type="string">
            <text:p>CLASSÉ EN CATÉGORIE ACTIVE DE LA DGDDI AVEC PERCEPTION DE L’IRTI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1" office:value-type="string" calcext:value-type="string">
            <text:p>DÉTACHEMENT DES FONCTIONNAIRES TERRITORIAUX OU HOSPITALIERS <text:s/>EN APPLICATION DES ARTICLES L.513-1 A L.513-13 DU CODE GÉNÉRAL DE LA FONCTION PUBLIQUE SUR EMPLOI NE CONDUISANT PAS A PENSION OR RELEVANT D’AUTRES REGIMES DE RETRAITE NON GERES EN PSOP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6</text:p>
          </table:table-cell>
          <table:table-cell table:style-name="ce13" office:value-type="string" calcext:value-type="string">
            <text:p>AU SEIN DE L’ÉTAT, D’UN ÉTABLISSEMENT PUBLIC OU D’UN GROUPEMENT D’INTÉRÊT PUBLIC</text:p>
          </table:table-cell>
          <table:table-cell table:number-columns-repeated="1022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B15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Light" style:font-family-generic="modern" style:font-pitch="variable"/>
    <style:font-face style:name="Marianne Light1" svg:font-family="'Marianne Light'" style:font-adornments="Maigre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499cm" fo:margin-right="1.499cm" fo:background-color="transparent" style:scale-to="95%" style:writing-mode="lr-tb">
        <style:background-image/>
      </style:page-layout-properties>
      <style:header-style>
        <style:header-footer-properties fo:min-height="1.199cm" fo:margin-left="0cm" fo:margin-right="0cm" fo:margin-bottom="1cm"/>
      </style:header-style>
      <style:footer-style>
        <style:header-footer-properties fo:min-height="1.199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Marianne Medium" fo:font-size="12pt" fo:font-weight="normal"/>
    </style:style>
    <style:style style:name="MT2" style:family="text">
      <style:text-properties style:font-name="Marianne"/>
    </style:style>
  </office:automatic-styles>
  <office:master-styles>
    <style:master-page style:name="Default" style:page-layout-name="Mpm1">
      <style:header>
        <text:p><text:span text:style-name="MT1">NOMENCLATURE DES CODES</text:span></text:p>
        <text:p><text:span text:style-name="MT1">ANNEXE 10 : CODES SITUATION STATUTAIRE</text:span></text:p>
      </style:header>
      <style:header-left style:display="false"/>
      <style:header-first style:display="false"/>
      <style:footer>
        <style:region-left>
          <text:p><text:span text:style-name="MT2">Diffusion </text:span><text:span text:style-name="MT2"><text:title>???</text:title></text:span></text:p>
          <text:p><text:span text:style-name="MT2">DGFIP - 2FCE2A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09:44:26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2T13:14:03.157000000</meta:creation-date>
    <dc:date>2025-12-27T09:45:35.279000000</dc:date>
    <meta:editing-duration>PT50M8S</meta:editing-duration>
    <meta:editing-cycles>11</meta:editing-cycles>
    <meta:generator>LibreOffice/7.2.7.2.M7$Windows_X86_64 LibreOffice_project/eae1a20eee24d7fbeb19ff1fe91a658206f3f25b</meta:generator>
    <dc:creator>Gérard KIAVUE</dc:creator>
    <meta:document-statistic meta:table-count="1" meta:cell-count="288" meta:object-count="0"/>
  </office:meta>
</office:document-meta>
</file>